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F00000091063AB19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P1" style:family="paragraph" style:parent-style-name="Normal" style:master-page-name="MPF0">
      <style:paragraph-properties style:page-number="auto" fo:break-before="page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Calibri Light" fo:font-size="24pt" style:font-size-asian="24pt" style:font-name-complex="Open Sans" style:font-size-complex="14pt"/>
    </style:style>
    <style:style style:name="P4" style:family="paragraph" style:parent-style-name="Sin_20_espaciado">
      <style:paragraph-properties fo:line-height="115%" fo:text-align="center" style:justify-single-word="false"/>
      <style:text-properties style:font-name="Calibri" fo:font-size="20pt" style:font-size-asian="20pt" style:font-name-complex="Tahoma" style:font-size-complex="14pt"/>
    </style:style>
    <style:style style:name="P5" style:family="paragraph" style:parent-style-name="Sin_20_espaciado">
      <style:paragraph-properties fo:line-height="115%" fo:text-align="center" style:justify-single-word="false"/>
      <style:text-properties fo:color="#a45d4e" loext:opacity="100%" style:font-name="Calibri" fo:font-size="26pt" style:font-size-asian="26pt" style:font-name-complex="Tahoma" style:font-size-complex="14pt"/>
    </style:style>
    <style:style style:name="P6" style:family="paragraph" style:parent-style-name="Normal">
      <style:text-properties style:language-asian="en" style:country-asian="US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9" style:family="paragraph" style:parent-style-name="Text_20_body" style:list-style-name="L1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Text_20_body" style:list-style-name="L1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Heading_20_2">
      <style:text-properties officeooo:paragraph-rsid="000bbd7a"/>
    </style:style>
    <style:style style:name="P12" style:family="paragraph" style:parent-style-name="Text_20_body" style:list-style-name="L2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Text_20_body" style:list-style-name="L2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 style:list-style-name="L3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3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Normal" style:list-style-name=""/>
    <style:style style:name="T1" style:family="text">
      <style:text-properties style:font-name="Calibri Light" fo:font-size="24pt" style:font-size-asian="24pt" style:font-name-complex="Open Sans" style:font-size-complex="14pt"/>
    </style:style>
    <style:style style:name="T2" style:family="text">
      <style:text-properties style:font-name="Calibri Light" fo:font-size="18pt" style:font-size-asian="18pt" style:font-name-complex="Tahoma" style:font-size-complex="14pt"/>
    </style:style>
    <style:style style:name="T3" style:family="text">
      <style:text-properties officeooo:rsid="000abc31"/>
    </style:style>
    <style:style style:name="T4" style:family="text">
      <style:text-properties fo:font-variant="normal" fo:text-transform="none" style:text-underline-style="non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><draw:frame draw:style-name="fr1" draw:name="Imagen 1" text:anchor-type="as-char" svg:y="0cm" svg:width="16cm" style:rel-width="scale" svg:height="2.79cm" style:rel-height="scale" draw:z-index="0"><draw:image xlink:href="Pictures/100000010000033F00000091063AB190.png" xlink:type="simple" xlink:show="embed" xlink:actuate="onLoad" draw:mime-type="image/png"/><svg:desc>Icono

El contenido generado por IA puede ser incorrecto.</svg:desc></draw:frame></text:span></text:span></text:p>
      <text:p text:style-name="P3">IES Torrevigía</text:p>
      <text:p text:style-name="P4"/>
      <text:p text:style-name="P4"/>
      <text:p text:style-name="P4"/>
      <text:p text:style-name="P4"/>
      <text:p text:style-name="P2"><text:span text:style-name="Fuente_20_de_20_párrafo_20_predeter."><text:span text:style-name="T2">Ciclo Formativo de Grado Superior en Desarrollo de Aplicaciones Web</text:span></text:span></text:p>
      <text:p text:style-name="P5"><text:span text:style-name="T3">Propuesta de proyecto</text:span> </text:p>
      <text:p text:style-name="P6"/>
      <text:p text:style-name="P6"/>
      <text:p text:style-name="P6"/>
      <text:p text:style-name="P6"><text:tab/></text:p>
      <text:p text:style-name="Normal"/>
      <text:p text:style-name="Normal"/>
      <text:p text:style-name="Normal"/>
      <text:p text:style-name="Normal"/>
      <text:p text:style-name="Normal"/>
      <text:p text:style-name="P7"><text:span text:style-name="Fuente_20_de_20_párrafo_20_predeter."><text:s/>1. Propuesta</text:span></text:p>
      <text:p text:style-name="Heading_20_2">1.1. Planteamiento del problema y justificación</text:p>
      <text:p text:style-name="P8">En la actualidad, muchos negocios locales como las peluquerías siguen gestionando sus citas de forma manual o mediante métodos poco eficientes, como llamadas telefónicas o agendas físicas. Esto puede provocar errores en la organización, duplicidad de citas o pérdida de información.</text:p>
      <text:p text:style-name="P8">Este proyecto consiste en el diseño y desarrollo de una aplicación web de gestión de citas para una peluquería. La finalidad es ofrecer un sistema sencillo, intuitivo y accesible que permita a los clientes reservar citas de forma online, así como facilitar al administrador la gestión de servicios y la organización de las reservas.</text:p>
      <text:p text:style-name="P8">La aplicación busca mejorar la experiencia del usuario y optimizar la gestión interna del negocio, centralizando toda la información en una base de datos y reduciendo la carga administrativa.</text:p>
      <text:p text:style-name="Heading_20_2">1.2. Objetivos</text:p>
      <text:p text:style-name="P8">Los objetivos principales de este proyecto son los siguientes:</text:p>
      <text:list text:style-name="L1">
        <text:list-item>
          <text:p text:style-name="P9">Diseñar una interfaz web atractiva, intuitiva y adaptada a dispositivos móviles. </text:p>
        </text:list-item>
        <text:list-item>
          <text:p text:style-name="P9">Desarrollar una aplicación web funcional utilizando tecnologías frontend y backend. </text:p>
        </text:list-item>
        <text:list-item>
          <text:p text:style-name="P9">Implementar un sistema de gestión de usuarios con roles de cliente y administrador. </text:p>
        </text:list-item>
        <text:list-item>
          <text:p text:style-name="P9">Permitir a los clientes la creación, visualización y cancelación de citas. </text:p>
        </text:list-item>
        <text:list-item>
          <text:p text:style-name="P9">Desarrollar un panel de administración para la gestión de servicios y citas. </text:p>
        </text:list-item>
        <text:list-item>
          <text:p text:style-name="P9">Integrar una base de datos para almacenar la información de forma estructurada. </text:p>
        </text:list-item>
        <text:list-item>
          <text:p text:style-name="P10">Mejorar la experiencia del usuario mediante notificaciones y una interfaz visual clara. </text:p>
          <text:p text:style-name="P10"/>
        </text:list-item>
      </text:list>
      <text:p text:style-name="P11"><text:soft-page-break/>1.3. Funciones</text:p>
      <text:p text:style-name="P8">El sistema contará con las siguientes funcionalidades principales:</text:p>
      <text:list text:style-name="L2">
        <text:list-item>
          <text:p text:style-name="P12">Registro e inicio de sesión de usuarios. </text:p>
        </text:list-item>
        <text:list-item>
          <text:p text:style-name="P12">Diferenciación de roles (cliente y administrador). </text:p>
        </text:list-item>
        <text:list-item>
          <text:p text:style-name="P12">Creación de citas seleccionando servicio, fecha y hora. </text:p>
        </text:list-item>
        <text:list-item>
          <text:p text:style-name="P12">Visualización de citas del cliente en forma de listado y calendario semanal. </text:p>
        </text:list-item>
        <text:list-item>
          <text:p text:style-name="P12">Cancelación de citas por parte del cliente. </text:p>
        </text:list-item>
        <text:list-item>
          <text:p text:style-name="P12">Gestión de servicios por parte del administrador (crear y eliminar servicios). </text:p>
        </text:list-item>
        <text:list-item>
          <text:p text:style-name="P12">Gestión de citas por parte del administrador (confirmar o cancelar). </text:p>
        </text:list-item>
        <text:list-item>
          <text:p text:style-name="P12">Sistema de notificaciones para informar sobre acciones realizadas. </text:p>
        </text:list-item>
        <text:list-item>
          <text:p text:style-name="P13">Interfaz responsive adaptada a distintos dispositivos. </text:p>
        </text:list-item>
      </text:list>
      <text:p text:style-name="Heading_20_2">1.4. Medios técnicos</text:p>
      <text:p text:style-name="P8">Las tecnologías y herramientas utilizadas en el desarrollo del proyecto han sido las siguientes:</text:p>
      <text:list text:style-name="L3">
        <text:list-item>
          <text:p text:style-name="P14"><text:span text:style-name="Strong_20_Emphasis">HTML5</text:span> para la estructura de las páginas web. </text:p>
        </text:list-item>
        <text:list-item>
          <text:p text:style-name="P14"><text:span text:style-name="Strong_20_Emphasis">CSS3</text:span> para el diseño visual y la maquetación responsive. </text:p>
        </text:list-item>
        <text:list-item>
          <text:p text:style-name="P14"><text:span text:style-name="Strong_20_Emphasis">JavaScript</text:span> para funcionalidades dinámicas como modales y notificaciones. </text:p>
        </text:list-item>
        <text:list-item>
          <text:p text:style-name="P14"><text:span text:style-name="Strong_20_Emphasis">PHP</text:span> para la lógica del backend y la gestión del servidor. </text:p>
        </text:list-item>
        <text:list-item>
          <text:p text:style-name="P14"><text:span text:style-name="Strong_20_Emphasis">MySQL</text:span> para la gestión de la base de datos. </text:p>
        </text:list-item>
        <text:list-item>
          <text:p text:style-name="P14"><text:span text:style-name="Strong_20_Emphasis">XAMPP</text:span> como entorno de desarrollo local. </text:p>
        </text:list-item>
        <text:list-item>
          <text:p text:style-name="P14"><text:span text:style-name="Strong_20_Emphasis">Visual Studio Code</text:span> como editor de código. </text:p>
        </text:list-item>
        <text:list-item>
          <text:p text:style-name="P15"><text:span text:style-name="Strong_20_Emphasis">phpMyAdmin</text:span> para la administración de la base de datos.</text:p>
        </text:list-item>
      </text:list>
      <text:p text:style-name="P16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0.635cm" fo:hyphenation-ladder-count="no-limit" fo:hyphenation-keep="auto" loext:hyphenation-keep-type="column" loext:hyphenation-keep-line="false" fo:keep-with-next="always">
        <style:tab-stops/>
      </style:paragraph-properties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hyphenation-ladder-count="no-limit" fo:hyphenation-keep="auto" loext:hyphenation-keep-type="column" loext:hyphenation-keep-line="false" fo:keep-with-next="always"/>
      <style:text-properties fo:text-transform="uppercase" fo:color="#a45d4e" loext:opacity="100%" style:font-name="Calibri Light" fo:font-family="'Calibri Light'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left="1.251cm" fo:hyphenation-ladder-count="no-limit" fo:hyphenation-keep="auto" loext:hyphenation-keep-type="column" loext:hyphenation-keep-line="false" fo:text-indent="-1.251cm" style:auto-text-indent="false" fo:keep-with-next="always">
        <style:tab-stops/>
      </style:paragraph-properties>
      <style:text-properties style:font-name="Calibri Light" fo:font-family="'Calibri Light'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Párrafo_20_de_20_lista" style:next-style-name="Normal" style:default-outline-level="4">
      <style:paragraph-properties fo:margin-left="1.501cm" fo:hyphenation-ladder-count="no-limit" fo:hyphenation-keep="auto" loext:hyphenation-keep-type="column" loext:hyphenation-keep-line="false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 loext:hyphenation-keep-line="false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 style:default-outline-level="3" style:list-style-name="">
      <style:paragraph-properties fo:hyphenation-ladder-count="no-limit" fo:hyphenation-keep="auto" loext:hyphenation-keep-type="column" loext:hyphenation-keep-line="false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line-height="100%" fo:hyphenation-ladder-count="no-limit" fo:hyphenation-keep="auto" loext:hyphenation-keep-type="column" loext:hyphenation-keep-line="false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 loext:hyphenation-keep-line="false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Índice_20_1" style:display-name="Índice 1" style:family="paragraph" style:parent-style-name="Normal" style:next-style-name="Normal" style:auto-update="true" style:list-style-name="LFO9">
      <style:paragraph-properties fo:hyphenation-ladder-count="no-limit" fo:hyphenation-keep="auto" loext:hyphenation-keep-type="column" loext:hyphenation-keep-line="false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Índice_20_2" style:display-name="Índice 2" style:family="paragraph" style:parent-style-name="Normal" style:next-style-name="Normal" style:auto-update="true">
      <style:paragraph-properties fo:margin-left="1.251cm" fo:hyphenation-ladder-count="no-limit" fo:hyphenation-keep="auto" loext:hyphenation-keep-type="column" loext:hyphenation-keep-line="false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Índice_20_3" style:display-name="Índice 3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 loext:hyphenation-keep-line="false">
        <style:tab-stops>
          <style:tab-stop style:position="14.499cm" style:type="right"/>
        </style:tab-stops>
      </style:paragraph-properties>
      <style:text-properties fo:color="#a45d4e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 loext:hyphenation-keep-line="false"/>
      <style:text-properties fo:color="#a45d4e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Pie_20_de_20_página">
      <style:paragraph-properties fo:text-align="end" style:justify-single-word="false" fo:hyphenation-ladder-count="no-limit" fo:hyphenation-keep="auto" loext:hyphenation-keep-type="column" loext:hyphenation-keep-line="false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Título_20_1" style:default-outline-level="1" style:list-style-name="">
      <style:paragraph-properties fo:hyphenation-ladder-count="no-limit" fo:hyphenation-keep="auto" loext:hyphenation-keep-type="column" loext:hyphenation-keep-line="false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hyphenation-ladder-count="no-limit" fo:hyphenation-keep="auto" loext:hyphenation-keep-type="column" loext:hyphenation-keep-line="false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foto-tabla" style:display-name="Pie de foto-tabla" style:family="paragraph" style:parent-style-name="Normal" style:next-style-name="Normal">
      <style:paragraph-properties fo:margin-left="-0.199cm" fo:margin-right="-0.379cm" fo:margin-top="0cm" fo:margin-bottom="0cm" style:contextual-spacing="false" fo:line-height="115%" fo:text-align="center" style:justify-single-word="false" fo:hyphenation-ladder-count="no-limit" fo:hyphenation-keep="auto" loext:hyphenation-keep-type="column" loext:hyphenation-keep-line="false">
        <style:tab-stops/>
      </style:paragraph-properties>
      <style:text-properties fo:color="#595959" loext:opacity="100%" style:font-name="Calibri" fo:font-family="Calibri" style:font-family-generic="swiss" style:font-pitch="variable" fo:font-size="9.5pt" fo:language="en" fo:country="US" style:font-size-asian="9.5pt" style:font-name-complex="UnitOT-Light" style:font-family-complex="UnitOT-Light" style:font-family-generic-complex="swiss" style:font-pitch-complex="variable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a45d4e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a45d4e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2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officeooo:rsid="0007f608" officeooo:paragraph-rsid="0007f608" style:font-size-asian="10pt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officeooo:rsid="000abc31" officeooo:paragraph-rsid="000abc31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Roberto Rumenov Carrasco</text:p>
        <text:p text:style-name="MP2">Propuesta de proyecto</text:p>
      </style:header>
      <style:footer>
        <text:p text:style-name="Página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dc:title/>
    <dc:subject/>
    <meta:creation-date>2025-09-18T09:09:00Z</meta:creation-date>
    <dc:date>2026-05-27T23:39:03.262570700</dc:date>
    <meta:print-date>2019-08-05T13:11:00Z</meta:print-date>
    <meta:editing-cycles>7</meta:editing-cycles>
    <meta:editing-duration>PT6M31S</meta:editing-duration>
    <meta:document-statistic meta:table-count="0" meta:image-count="1" meta:object-count="0" meta:page-count="3" meta:paragraph-count="44" meta:word-count="440" meta:character-count="2831" meta:non-whitespace-character-count="2431"/>
    <meta:user-defined meta:name="ContentTypeId">0x010100DF3D7C797EA12745A270EF30E38719B9</meta:user-defined>
    <meta:user-defined meta:name="MediaServiceImageTags"/>
    <meta:template xlink:type="simple" xlink:actuate="onRequest" xlink:title="" xlink:href="../plantilla.odt/Normal.dotm"/>
  </office:meta>
</office:document-meta>
</file>
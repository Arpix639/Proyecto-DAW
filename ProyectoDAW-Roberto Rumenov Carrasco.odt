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B6000000B61D313943.png" manifest:media-type="image/png"/>
  <manifest:file-entry manifest:full-path="Pictures/10000001000002C2000001CD3B7355BC.png" manifest:media-type="image/png"/>
  <manifest:file-entry manifest:full-path="Pictures/1000000100000767000002846AAF552E.png" manifest:media-type="image/png"/>
  <manifest:file-entry manifest:full-path="Pictures/100000010000026D000002387BC7C20F.png" manifest:media-type="image/png"/>
  <manifest:file-entry manifest:full-path="Pictures/1000000100000655000002D4976BC47C.png" manifest:media-type="image/png"/>
  <manifest:file-entry manifest:full-path="Pictures/10000000000004000000030013012A29.png" manifest:media-type="image/png"/>
  <manifest:file-entry manifest:full-path="Pictures/10000001000002F6000002406E4CAA3F.png" manifest:media-type="image/png"/>
  <manifest:file-entry manifest:full-path="Pictures/1000000100000725000003760E720156.png" manifest:media-type="image/png"/>
  <manifest:file-entry manifest:full-path="Pictures/10000001000007650000023031243DE7.png" manifest:media-type="image/png"/>
  <manifest:file-entry manifest:full-path="Pictures/10000001000007690000029EA79AB9A0.png" manifest:media-type="image/png"/>
  <manifest:file-entry manifest:full-path="Pictures/100000010000033F00000091063AB19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5.016cm" fo:margin-left="0cm" table:align="left"/>
    </style:style>
    <style:style style:name="Tabla1.A" style:family="table-column">
      <style:table-column-properties style:column-width="8.26cm"/>
    </style:style>
    <style:style style:name="Tabla1.B" style:family="table-column">
      <style:table-column-properties style:column-width="6.756cm"/>
    </style:style>
    <style:style style:name="Tabla1.A1" style:family="table-cell">
      <style:table-cell-properties style:vertical-align="middle" fo:padding-left="0.191cm" fo:padding-right="0.191cm" fo:padding-top="0cm" fo:padding-bottom="0cm" fo:border="0.5pt solid #e7e6e6" style:writing-mode="lr-tb"/>
    </style:style>
    <style:style style:name="P1" style:family="paragraph" style:parent-style-name="Normal" style:master-page-name="MPF0">
      <style:paragraph-properties style:page-number="auto" fo:break-before="page"/>
    </style:style>
    <style:style style:name="P2" style:family="paragraph" style:parent-style-name="Sin_20_espaciado">
      <style:paragraph-properties fo:line-height="115%" fo:text-align="center" style:justify-single-word="false"/>
    </style:style>
    <style:style style:name="P3" style:family="paragraph" style:parent-style-name="Sin_20_espaciado">
      <style:text-properties style:font-name="Calibri Light" fo:font-size="24pt" style:font-size-asian="24pt" style:font-name-complex="Open Sans" style:font-size-complex="14pt"/>
    </style:style>
    <style:style style:name="P4" style:family="paragraph" style:parent-style-name="Sin_20_espaciado">
      <style:paragraph-properties fo:line-height="115%" fo:text-align="center" style:justify-single-word="false"/>
      <style:text-properties style:font-name="Calibri" fo:font-size="20pt" style:font-size-asian="20pt" style:font-name-complex="Tahoma" style:font-size-complex="14pt"/>
    </style:style>
    <style:style style:name="P5" style:family="paragraph" style:parent-style-name="Sin_20_espaciado">
      <style:paragraph-properties fo:line-height="115%" fo:text-align="center" style:justify-single-word="false"/>
      <style:text-properties fo:color="#a45d4e" loext:opacity="100%" style:font-name="Calibri" fo:font-size="26pt" style:font-size-asian="26pt" style:font-name-complex="Tahoma" style:font-size-complex="14pt"/>
    </style:style>
    <style:style style:name="P6" style:family="paragraph" style:parent-style-name="Normal">
      <style:text-properties style:language-asian="en" style:country-asian="US"/>
    </style:style>
    <style:style style:name="P7" style:family="paragraph" style:parent-style-name="Sin_20_espaciado">
      <style:paragraph-properties fo:line-height="115%"/>
      <style:text-properties style:font-name="Calibri Light" fo:font-size="12pt" style:font-size-asian="12pt" style:font-name-complex="Tahoma" style:font-size-complex="14pt"/>
    </style:style>
    <style:style style:name="P8" style:family="paragraph" style:parent-style-name="Sin_20_espaciado">
      <style:paragraph-properties fo:line-height="115%"/>
      <style:text-properties style:font-name="Calibri Light" fo:font-size="12pt" officeooo:rsid="0007b5ff" officeooo:paragraph-rsid="0007b5ff" style:font-size-asian="12pt" style:font-name-complex="Tahoma" style:font-size-complex="14pt"/>
    </style:style>
    <style:style style:name="P9" style:family="paragraph" style:parent-style-name="Título_20_Índices">
      <style:paragraph-properties fo:break-before="page"/>
    </style:style>
    <style:style style:name="P10" style:family="paragraph" style:parent-style-name="TDC_20_1">
      <style:paragraph-properties>
        <style:tab-stops>
          <style:tab-stop style:position="15.998cm" style:type="right" style:leader-style="dotted" style:leader-text="."/>
        </style:tab-stops>
      </style:paragraph-properties>
    </style:style>
    <style:style style:name="P11" style:family="paragraph" style:parent-style-name="TDC_20_2">
      <style:paragraph-properties>
        <style:tab-stops>
          <style:tab-stop style:position="15.609cm" style:type="right" style:leader-style="dotted" style:leader-text="."/>
        </style:tab-stops>
      </style:paragraph-properties>
    </style:style>
    <style:style style:name="P12" style:family="paragraph" style:parent-style-name="TDC_20_3">
      <style:paragraph-properties>
        <style:tab-stops>
          <style:tab-stop style:position="15.222cm" style:type="right" style:leader-style="dotted" style:leader-text="."/>
        </style:tab-stops>
      </style:paragraph-properties>
    </style:style>
    <style:style style:name="P13" style:family="paragraph" style:parent-style-name="Título_20_1" style:list-style-name="">
      <style:paragraph-properties fo:break-before="page"/>
    </style:style>
    <style:style style:name="P14" style:family="paragraph" style:parent-style-name="Normal">
      <style:text-properties officeooo:paragraph-rsid="0007b5ff"/>
    </style:style>
    <style:style style:name="P15" style:family="paragraph" style:parent-style-name="Normal">
      <style:text-properties officeooo:rsid="0007b5ff" officeooo:paragraph-rsid="0007b5ff"/>
    </style:style>
    <style:style style:name="P16" style:family="paragraph" style:parent-style-name="Título_20_3">
      <style:text-properties officeooo:rsid="0009900b" officeooo:paragraph-rsid="0009900b"/>
    </style:style>
    <style:style style:name="P17" style:family="paragraph" style:parent-style-name="Normal">
      <style:text-properties officeooo:rsid="000e8a25" officeooo:paragraph-rsid="000e8a25"/>
    </style:style>
    <style:style style:name="P18" style:family="paragraph" style:parent-style-name="Título_20_4">
      <style:paragraph-properties fo:margin-left="0cm" fo:text-indent="0cm" style:auto-text-indent="false">
        <style:tab-stops/>
      </style:paragraph-properties>
      <style:text-properties officeooo:rsid="000e8a25" officeooo:paragraph-rsid="000e8a25"/>
    </style:style>
    <style:style style:name="P19" style:family="paragraph" style:parent-style-name="Normal">
      <style:paragraph-properties fo:margin-left="0cm" fo:text-indent="0cm" style:auto-text-indent="false">
        <style:tab-stops/>
      </style:paragraph-properties>
      <style:text-properties officeooo:rsid="000fe42d" officeooo:paragraph-rsid="000fe42d"/>
    </style:style>
    <style:style style:name="P20" style:family="paragraph" style:parent-style-name="Título_20_2">
      <style:text-properties officeooo:paragraph-rsid="000e8a25"/>
    </style:style>
    <style:style style:name="P21" style:family="paragraph" style:parent-style-name="Título_20_4">
      <style:paragraph-properties fo:margin-left="0cm" fo:text-indent="0cm" style:auto-text-indent="false">
        <style:tab-stops/>
      </style:paragraph-properties>
      <style:text-properties fo:font-variant="normal" fo:text-transform="none" officeooo:rsid="000fe42d" officeooo:paragraph-rsid="000fe42d"/>
    </style:style>
    <style:style style:name="P22" style:family="paragraph" style:parent-style-name="Normal">
      <style:paragraph-properties fo:margin-left="0cm" fo:text-indent="0cm" style:auto-text-indent="false">
        <style:tab-stops/>
      </style:paragraph-properties>
      <style:text-properties fo:font-variant="normal" fo:text-transform="none" officeooo:rsid="000fe42d" officeooo:paragraph-rsid="000fe42d"/>
    </style:style>
    <style:style style:name="P23" style:family="paragraph" style:parent-style-name="Normal">
      <style:paragraph-properties fo:margin-left="0cm" fo:text-indent="0cm" style:auto-text-indent="false">
        <style:tab-stops/>
      </style:paragraph-properties>
      <style:text-properties fo:font-variant="normal" fo:text-transform="none" fo:font-weight="normal" officeooo:rsid="000fe42d" officeooo:paragraph-rsid="000fe42d" style:font-weight-asian="normal" style:font-weight-complex="normal"/>
    </style:style>
    <style:style style:name="P24" style:family="paragraph" style:parent-style-name="Título_20_4">
      <style:paragraph-properties fo:margin-left="0cm" fo:text-indent="0cm" style:auto-text-indent="false">
        <style:tab-stops/>
      </style:paragraph-properties>
      <style:text-properties officeooo:rsid="000fe42d" officeooo:paragraph-rsid="000fe42d"/>
    </style:style>
    <style:style style:name="P25" style:family="paragraph" style:parent-style-name="Normal">
      <style:paragraph-properties fo:margin-left="0cm" fo:text-indent="0cm" style:auto-text-indent="false">
        <style:tab-stops/>
      </style:paragraph-properties>
      <style:text-properties officeooo:paragraph-rsid="000fe42d"/>
    </style:style>
    <style:style style:name="P26" style:family="paragraph" style:parent-style-name="Normal">
      <style:paragraph-properties fo:margin-left="0cm" fo:text-indent="0cm" style:auto-text-indent="false">
        <style:tab-stops/>
      </style:paragraph-properties>
      <style:text-properties fo:font-weight="bold" officeooo:rsid="000fe42d" officeooo:paragraph-rsid="000fe42d" style:font-weight-asian="bold" style:font-weight-complex="bold"/>
    </style:style>
    <style:style style:name="P27" style:family="paragraph" style:parent-style-name="Normal">
      <style:paragraph-properties fo:margin-left="0cm" fo:text-indent="0cm" style:auto-text-indent="false">
        <style:tab-stops/>
      </style:paragraph-properties>
      <style:text-properties fo:font-weight="normal" officeooo:rsid="000fe42d" officeooo:paragraph-rsid="000fe42d" style:font-weight-asian="normal" style:font-weight-complex="normal"/>
    </style:style>
    <style:style style:name="P28" style:family="paragraph" style:parent-style-name="Normal">
      <style:paragraph-properties fo:margin-left="0cm" fo:text-indent="0cm" style:auto-text-indent="false">
        <style:tab-stops/>
      </style:paragraph-properties>
      <style:text-properties fo:font-weight="bold" officeooo:rsid="0011b548" officeooo:paragraph-rsid="000fe42d" style:font-weight-asian="bold" style:font-weight-complex="bold"/>
    </style:style>
    <style:style style:name="P29" style:family="paragraph" style:parent-style-name="Normal">
      <style:paragraph-properties fo:margin-left="0cm" fo:text-indent="0cm" style:auto-text-indent="false">
        <style:tab-stops/>
      </style:paragraph-properties>
      <style:text-properties fo:font-weight="normal" officeooo:rsid="0011b548" officeooo:paragraph-rsid="000fe42d" style:font-weight-asian="normal" style:font-weight-complex="normal"/>
    </style:style>
    <style:style style:name="P30" style:family="paragraph" style:parent-style-name="Título_20_4">
      <style:paragraph-properties fo:margin-left="0cm" fo:text-indent="0cm" style:auto-text-indent="false">
        <style:tab-stops/>
      </style:paragraph-properties>
      <style:text-properties fo:font-weight="bold" officeooo:rsid="0011b548" officeooo:paragraph-rsid="0011b548" style:font-weight-asian="bold" style:font-weight-complex="bold"/>
    </style:style>
    <style:style style:name="P31" style:family="paragraph" style:parent-style-name="Normal">
      <style:paragraph-properties fo:margin-left="0cm" fo:text-indent="0cm" style:auto-text-indent="false">
        <style:tab-stops/>
      </style:paragraph-properties>
      <style:text-properties fo:font-weight="normal" officeooo:rsid="0011b548" officeooo:paragraph-rsid="0011b548" style:font-weight-asian="normal" style:font-weight-complex="normal"/>
    </style:style>
    <style:style style:name="P32" style:family="paragraph" style:parent-style-name="Normal">
      <style:paragraph-properties fo:margin-left="0cm" fo:text-indent="0cm" style:auto-text-indent="false">
        <style:tab-stops/>
      </style:paragraph-properties>
      <style:text-properties fo:font-weight="bold" officeooo:rsid="0011b548" officeooo:paragraph-rsid="0011b548" style:font-weight-asian="bold" style:font-weight-complex="bold"/>
    </style:style>
    <style:style style:name="P33" style:family="paragraph" style:parent-style-name="Normal">
      <style:paragraph-properties fo:margin-left="0cm" fo:text-indent="0cm" style:auto-text-indent="false">
        <style:tab-stops/>
      </style:paragraph-properties>
      <style:text-properties fo:font-weight="bold" officeooo:rsid="0012569f" officeooo:paragraph-rsid="0012569f" style:font-weight-asian="bold" style:font-weight-complex="bold"/>
    </style:style>
    <style:style style:name="P34" style:family="paragraph" style:parent-style-name="Normal">
      <style:paragraph-properties fo:margin-left="0cm" fo:text-indent="0cm" style:auto-text-indent="false">
        <style:tab-stops/>
      </style:paragraph-properties>
      <style:text-properties fo:font-weight="normal" officeooo:rsid="0012569f" officeooo:paragraph-rsid="0012569f" style:font-weight-asian="normal" style:font-weight-complex="normal"/>
    </style:style>
    <style:style style:name="P35" style:family="paragraph" style:parent-style-name="Título_20_2" style:list-style-name="">
      <style:text-properties fo:font-variant="normal" fo:text-transform="none"/>
    </style:style>
    <style:style style:name="P36" style:family="paragraph" style:parent-style-name="Normal">
      <style:text-properties fo:font-variant="normal" fo:text-transform="none" officeooo:rsid="0013bc45" officeooo:paragraph-rsid="0013bc45"/>
    </style:style>
    <style:style style:name="P37" style:family="paragraph" style:parent-style-name="Normal">
      <style:text-properties officeooo:rsid="00144855" officeooo:paragraph-rsid="00144855"/>
    </style:style>
    <style:style style:name="P38" style:family="paragraph" style:parent-style-name="Normal">
      <style:text-properties fo:font-weight="bold" officeooo:rsid="00144855" officeooo:paragraph-rsid="00144855" style:font-weight-asian="bold" style:font-weight-complex="bold"/>
    </style:style>
    <style:style style:name="P39" style:family="paragraph" style:parent-style-name="Normal">
      <style:text-properties fo:font-weight="bold" officeooo:rsid="0014cc2e" officeooo:paragraph-rsid="0014cc2e" style:font-weight-asian="bold" style:font-weight-complex="bold"/>
    </style:style>
    <style:style style:name="P40" style:family="paragraph" style:parent-style-name="Normal">
      <style:text-properties fo:font-weight="bold" style:font-weight-asian="bold" style:font-weight-complex="bold"/>
    </style:style>
    <style:style style:name="P41" style:family="paragraph" style:parent-style-name="Título_20_2">
      <style:text-properties officeooo:paragraph-rsid="0014cc2e"/>
    </style:style>
    <style:style style:name="P42" style:family="paragraph" style:parent-style-name="Normal">
      <style:text-properties officeooo:paragraph-rsid="0014cc2e"/>
    </style:style>
    <style:style style:name="P43" style:family="paragraph" style:parent-style-name="Normal">
      <style:text-properties officeooo:rsid="0015e0b6" officeooo:paragraph-rsid="0015e0b6"/>
    </style:style>
    <style:style style:name="P44" style:family="paragraph" style:parent-style-name="Normal">
      <style:text-properties officeooo:rsid="0015f9b8" officeooo:paragraph-rsid="0015f9b8"/>
    </style:style>
    <style:style style:name="P45" style:family="paragraph" style:parent-style-name="Normal">
      <style:text-properties officeooo:rsid="00191149" officeooo:paragraph-rsid="00191149"/>
    </style:style>
    <style:style style:name="P46" style:family="paragraph" style:parent-style-name="Normal">
      <style:text-properties officeooo:rsid="001a01e1" officeooo:paragraph-rsid="001a01e1"/>
    </style:style>
    <style:style style:name="P47" style:family="paragraph" style:parent-style-name="Normal">
      <style:paragraph-properties fo:margin-top="0cm" fo:margin-bottom="0cm" style:contextual-spacing="false" fo:line-height="100%" fo:text-align="start" style:justify-single-word="false" fo:break-before="page"/>
    </style:style>
    <style:style style:name="P48" style:family="paragraph" style:parent-style-name="Normal">
      <style:text-properties officeooo:paragraph-rsid="00200dd3"/>
    </style:style>
    <style:style style:name="P49" style:family="paragraph" style:parent-style-name="Título_20_1_20_sin_20_numerar">
      <style:text-properties fo:language="en" fo:country="US"/>
    </style:style>
    <style:style style:name="P50" style:family="paragraph" style:parent-style-name="Normal">
      <style:text-properties fo:language="en" fo:country="US"/>
    </style:style>
    <style:style style:name="P51" style:family="paragraph" style:parent-style-name="Anexo" style:list-style-name="">
      <style:paragraph-properties fo:margin-left="0.635cm">
        <style:tab-stops/>
      </style:paragraph-properties>
    </style:style>
    <style:style style:name="T1" style:family="text">
      <style:text-properties style:font-name="Calibri Light" fo:font-size="24pt" style:font-size-asian="24pt" style:font-name-complex="Open Sans" style:font-size-complex="14pt"/>
    </style:style>
    <style:style style:name="T2" style:family="text">
      <style:text-properties style:font-name="Calibri Light" fo:font-size="18pt" style:font-size-asian="18pt" style:font-name-complex="Tahoma" style:font-size-complex="14pt"/>
    </style:style>
    <style:style style:name="T3" style:family="text">
      <style:text-properties fo:font-variant="normal" fo:text-transform="none"/>
    </style:style>
    <style:style style:name="T4" style:family="text">
      <style:text-properties fo:font-variant="normal" fo:text-transform="none" officeooo:rsid="00074150"/>
    </style:style>
    <style:style style:name="T5" style:family="text">
      <style:text-properties fo:font-variant="normal" fo:text-transform="none" officeooo:rsid="0007b5ff"/>
    </style:style>
    <style:style style:name="T6" style:family="text">
      <style:text-properties officeooo:rsid="0007b5ff"/>
    </style:style>
    <style:style style:name="T7" style:family="text">
      <style:text-properties officeooo:rsid="0008a21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0fe42d" style:font-weight-asian="bold" style:font-weight-complex="bold"/>
    </style:style>
    <style:style style:name="T11" style:family="text">
      <style:text-properties fo:font-weight="bold" officeooo:rsid="0011b548" style:font-weight-asian="bold" style:font-weight-complex="bold"/>
    </style:style>
    <style:style style:name="T12" style:family="text">
      <style:text-properties officeooo:rsid="0012569f"/>
    </style:style>
    <style:style style:name="T13" style:family="text">
      <style:text-properties officeooo:rsid="0014cc2e"/>
    </style:style>
    <style:style style:name="T14" style:family="text">
      <style:text-properties fo:font-style="italic" style:font-style-asian="italic"/>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3" text:anchor-type="page" text:anchor-page-number="13" svg:x="2.939cm" svg:y="23.56cm" svg:width="16cm" svg:height="2.413cm" draw:z-index="10">
        <draw:image xlink:href="Pictures/10000001000004B6000000B61D313943.png" xlink:type="simple" xlink:show="embed" xlink:actuate="onLoad" draw:mime-type="image/png"/>
      </draw:frame>
      <draw:frame draw:style-name="fr2" draw:name="Imagen12" text:anchor-type="page" text:anchor-page-number="13" svg:x="2.893cm" svg:y="8.079cm" svg:width="16cm" svg:height="10.448cm" draw:z-index="9">
        <draw:image xlink:href="Pictures/10000001000002C2000001CD3B7355BC.png" xlink:type="simple" xlink:show="embed" xlink:actuate="onLoad" draw:mime-type="image/png"/>
      </draw:frame>
      <draw:frame draw:style-name="fr2" draw:name="Imagen11" text:anchor-type="page" text:anchor-page-number="12" svg:x="4.249cm" svg:y="17.752cm" svg:width="12.271cm" svg:height="11.222cm" draw:z-index="8">
        <draw:image xlink:href="Pictures/100000010000026D000002387BC7C20F.png" xlink:type="simple" xlink:show="embed" xlink:actuate="onLoad" draw:mime-type="image/png"/>
      </draw:frame>
      <draw:frame draw:style-name="fr2" draw:name="Imagen10" text:anchor-type="page" text:anchor-page-number="12" svg:x="3.62cm" svg:y="2.776cm" svg:width="14.055cm" svg:height="10.68cm" draw:z-index="2">
        <draw:image xlink:href="Pictures/10000001000002F6000002406E4CAA3F.png" xlink:type="simple" xlink:show="embed" xlink:actuate="onLoad" draw:mime-type="image/png"/>
      </draw:frame>
      <draw:frame draw:style-name="fr2" draw:name="Imagen2" text:anchor-type="page" text:anchor-page-number="9" svg:x="3.179cm" svg:y="2.526cm" svg:width="16cm" svg:height="11.998cm" draw:z-index="1">
        <draw:image xlink:href="Pictures/10000000000004000000030013012A29.png" xlink:type="simple" xlink:show="embed" xlink:actuate="onLoad" draw:mime-type="image/png"/>
      </draw:frame>
      <draw:frame draw:style-name="fr2" draw:name="Imagen3" text:anchor-type="page" text:anchor-page-number="9" svg:x="3.38cm" svg:y="19.553cm" svg:width="15.586cm" svg:height="7.549cm" draw:z-index="3">
        <draw:image xlink:href="Pictures/1000000100000725000003760E720156.png" xlink:type="simple" xlink:show="embed" xlink:actuate="onLoad" draw:mime-type="image/png"/>
      </draw:frame>
      <draw:frame draw:style-name="fr2" draw:name="Imagen4" text:anchor-type="page" text:anchor-page-number="10" svg:x="3.11cm" svg:y="3.307cm" svg:width="16cm" svg:height="7.146cm" draw:z-index="4">
        <draw:image xlink:href="Pictures/1000000100000655000002D4976BC47C.png" xlink:type="simple" xlink:show="embed" xlink:actuate="onLoad" draw:mime-type="image/png"/>
      </draw:frame>
      <draw:frame draw:style-name="fr2" draw:name="Imagen5" text:anchor-type="page" text:anchor-page-number="10" svg:x="3.112cm" svg:y="12.005cm" svg:width="16cm" svg:height="4.731cm" draw:z-index="5">
        <draw:image xlink:href="Pictures/10000001000007650000023031243DE7.png" xlink:type="simple" xlink:show="embed" xlink:actuate="onLoad" draw:mime-type="image/png"/>
      </draw:frame>
      <draw:frame draw:style-name="fr2" draw:name="Imagen6" text:anchor-type="page" text:anchor-page-number="10" svg:x="3.041cm" svg:y="19.084cm" svg:width="16cm" svg:height="5.438cm" draw:z-index="6">
        <draw:image xlink:href="Pictures/1000000100000767000002846AAF552E.png" xlink:type="simple" xlink:show="embed" xlink:actuate="onLoad" draw:mime-type="image/png"/>
      </draw:frame>
      <draw:frame draw:style-name="fr2" draw:name="Imagen7" text:anchor-type="page" text:anchor-page-number="11" svg:x="3.11cm" svg:y="3.473cm" svg:width="16cm" svg:height="5.655cm" draw:z-index="7">
        <draw:image xlink:href="Pictures/10000001000007690000029EA79AB9A0.png" xlink:type="simple" xlink:show="embed" xlink:actuate="onLoad" draw:mime-type="image/png"/>
      </draw:frame>
      <text:p text:style-name="P1"/>
      <text:p text:style-name="P2"><text:span text:style-name="Fuente_20_de_20_párrafo_20_predeter."><text:span text:style-name="T1"><draw:frame draw:style-name="fr1" draw:name="Imagen 1" text:anchor-type="as-char" svg:y="0cm" svg:width="16cm" style:rel-width="scale" svg:height="2.79cm" style:rel-height="scale" draw:z-index="0"><draw:image xlink:href="Pictures/100000010000033F00000091063AB190.png" xlink:type="simple" xlink:show="embed" xlink:actuate="onLoad" draw:mime-type="image/png"/><svg:desc>Icono

El contenido generado por IA puede ser incorrecto.</svg:desc></draw:frame></text:span></text:span></text:p>
      <text:p text:style-name="P3">IES Torrevigía</text:p>
      <text:p text:style-name="P4"/>
      <text:p text:style-name="P4"/>
      <text:p text:style-name="P4"/>
      <text:p text:style-name="P4"/>
      <text:p text:style-name="P2"><text:span text:style-name="Fuente_20_de_20_párrafo_20_predeter."><text:span text:style-name="T2">Ciclo Formativo de Grado Superior en Desarrollo de Aplicaciones Web</text:span></text:span></text:p>
      <text:p text:style-name="P5">Desarrollo de una tienda online de videojuegos </text:p>
      <text:p text:style-name="P6"/>
      <text:p text:style-name="P6"/>
      <text:p text:style-name="P6"/>
      <text:p text:style-name="P6"><text:tab/></text:p>
      <text:p text:style-name="P6"/>
      <table:table table:name="Tabla1" table:style-name="Tabla1">
        <table:table-column table:style-name="Tabla1.A"/>
        <table:table-column table:style-name="Tabla1.B"/>
        <table:table-row>
          <table:table-cell table:style-name="Tabla1.A1" office:value-type="string">
            <text:p text:style-name="P7">Trabajo fin de estudio presentado por:</text:p>
          </table:table-cell>
          <table:table-cell table:style-name="Tabla1.A1" office:value-type="string">
            <text:p text:style-name="P8">Roberto Rumenov Carrasco</text:p>
          </table:table-cell>
        </table:table-row>
        <table:table-row>
          <table:table-cell table:style-name="Tabla1.A1" office:value-type="string">
            <text:p text:style-name="P7">Tipo de trabajo:</text:p>
          </table:table-cell>
          <table:table-cell table:style-name="Tabla1.A1" office:value-type="string">
            <text:p text:style-name="P7">Aplicación Web</text:p>
          </table:table-cell>
        </table:table-row>
        <table:table-row>
          <table:table-cell table:style-name="Tabla1.A1" office:value-type="string">
            <text:p text:style-name="P7">Tutor/a:</text:p>
          </table:table-cell>
          <table:table-cell table:style-name="Tabla1.A1" office:value-type="string">
            <text:p text:style-name="P7"/>
          </table:table-cell>
        </table:table-row>
        <table:table-row>
          <table:table-cell table:style-name="Tabla1.A1" office:value-type="string">
            <text:p text:style-name="P7">Fecha:</text:p>
          </table:table-cell>
          <table:table-cell table:style-name="Tabla1.A1" office:value-type="string">
            <text:p text:style-name="P7"/>
          </table:table-cell>
        </table:table-row>
      </table:table>
      <text:p text:style-name="P9"><text:bookmark text:name="_Toc437509152"/>Índice de contenidos</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0"><text:a xlink:type="simple" xlink:href="#__RefHeading___Toc1145_3683543185" office:name="Introducción" text:style-name="Index_20_Link" text:visited-style-name="Index_20_Link">Introducción<text:tab/>7</text:a></text:p>
          <text:p text:style-name="P11"><text:a xlink:type="simple" xlink:href="#__RefHeading___Toc1147_3683543185" office:name="Planteamiento del problema y Justificación" text:style-name="Index_20_Link" text:visited-style-name="Index_20_Link">Planteamiento del problema y Justificación<text:tab/>7</text:a></text:p>
          <text:p text:style-name="P11"><text:a xlink:type="simple" xlink:href="#__RefHeading___Toc1149_3683543185" office:name="Objetivos" text:style-name="Index_20_Link" text:visited-style-name="Index_20_Link">Objetivos<text:tab/>7</text:a></text:p>
          <text:p text:style-name="P12"><text:a xlink:type="simple" xlink:href="#__RefHeading___Toc1151_3683543185" office:name="Objetivo general" text:style-name="Index_20_Link" text:visited-style-name="Index_20_Link">Objetivo general<text:tab/>7</text:a></text:p>
          <text:p text:style-name="P12"><text:a xlink:type="simple" xlink:href="#__RefHeading___Toc1153_3683543185" office:name="Objetivos específicos" text:style-name="Index_20_Link" text:visited-style-name="Index_20_Link">Objetivos específicos<text:tab/>8</text:a></text:p>
          <text:p text:style-name="P10"><text:a xlink:type="simple" xlink:href="#__RefHeading___Toc1155_3683543185" office:name="Análisis" text:style-name="Index_20_Link" text:visited-style-name="Index_20_Link">Análisis<text:tab/>9</text:a></text:p>
          <text:p text:style-name="P11"><text:a xlink:type="simple" xlink:href="#__RefHeading___Toc1157_3683543185" office:name="Requisitos funcionales / no funcionales" text:style-name="Index_20_Link" text:visited-style-name="Index_20_Link">Requisitos funcionales / no funcionales<text:tab/>9</text:a></text:p>
          <text:p text:style-name="P12"><text:a xlink:type="simple" xlink:href="#__RefHeading___Toc1159_3683543185" office:name="Subapartado 1.1" text:style-name="Index_20_Link" text:visited-style-name="Index_20_Link">Subapartado 1.1<text:tab/>9</text:a></text:p>
          <text:p text:style-name="P12"><text:a xlink:type="simple" xlink:href="#__RefHeading___Toc1161_3683543185" office:name="Subapartado 1.2" text:style-name="Index_20_Link" text:visited-style-name="Index_20_Link">Subapartado 1.2<text:tab/>9</text:a></text:p>
          <text:p text:style-name="P11"><text:a xlink:type="simple" xlink:href="#__RefHeading___Toc1163_3683543185" office:name=" Estudio del Arte" text:style-name="Index_20_Link" text:visited-style-name="Index_20_Link"><text:s/>Estudio del Arte<text:tab/>9</text:a></text:p>
          <text:p text:style-name="P11"><text:a xlink:type="simple" xlink:href="#__RefHeading___Toc1165_3683543185" office:name="Arquitectura de la aplicación" text:style-name="Index_20_Link" text:visited-style-name="Index_20_Link">Arquitectura de la aplicación<text:tab/>9</text:a></text:p>
          <text:p text:style-name="P11"><text:a xlink:type="simple" xlink:href="#__RefHeading___Toc1167_3683543185" office:name="Software y tecnologías utilizadas" text:style-name="Index_20_Link" text:visited-style-name="Index_20_Link">Software y tecnologías utilizadas<text:tab/>9</text:a></text:p>
          <text:p text:style-name="P11"><text:a xlink:type="simple" xlink:href="#__RefHeading___Toc1169_3683543185" office:name="Justificación de viabilidad" text:style-name="Index_20_Link" text:visited-style-name="Index_20_Link">Justificación de viabilidad<text:tab/>9</text:a></text:p>
          <text:p text:style-name="P10"><text:a xlink:type="simple" xlink:href="#__RefHeading___Toc1171_3683543185" office:name="Diseño" text:style-name="Index_20_Link" text:visited-style-name="Index_20_Link">Diseño<text:tab/>10</text:a></text:p>
          <text:p text:style-name="P11"><text:a xlink:type="simple" xlink:href="#__RefHeading___Toc1173_3683543185" office:name="Árbol de navegación" text:style-name="Index_20_Link" text:visited-style-name="Index_20_Link">Árbol de navegación<text:tab/>10</text:a></text:p>
          <text:p text:style-name="P11"><text:a xlink:type="simple" xlink:href="#__RefHeading___Toc1175_3683543185" office:name="Prototipo" text:style-name="Index_20_Link" text:visited-style-name="Index_20_Link">Prototipo<text:tab/>10</text:a></text:p>
          <text:p text:style-name="P11"><text:a xlink:type="simple" xlink:href="#__RefHeading___Toc1177_3683543185" office:name="Diagramas" text:style-name="Index_20_Link" text:visited-style-name="Index_20_Link">Diagramas<text:tab/>10</text:a></text:p>
          <text:p text:style-name="P12"><text:a xlink:type="simple" xlink:href="#__RefHeading___Toc1179_3683543185" office:name="Diagrama de casos de uso" text:style-name="Index_20_Link" text:visited-style-name="Index_20_Link">Diagrama de casos de uso<text:tab/>10</text:a></text:p>
          <text:p text:style-name="P12"><text:a xlink:type="simple" xlink:href="#__RefHeading___Toc1181_3683543185" office:name="Diagrama de clases" text:style-name="Index_20_Link" text:visited-style-name="Index_20_Link"><text:soft-page-break/>Diagrama de clases<text:tab/>10</text:a></text:p>
          <text:p text:style-name="P12"><text:a xlink:type="simple" xlink:href="#__RefHeading___Toc1183_3683543185" office:name="Modelo Entidad Relación" text:style-name="Index_20_Link" text:visited-style-name="Index_20_Link">Modelo Entidad Relación<text:tab/>10</text:a></text:p>
          <text:p text:style-name="P12"><text:a xlink:type="simple" xlink:href="#__RefHeading___Toc1185_3683543185" office:name="Diagrama de Gantt" text:style-name="Index_20_Link" text:visited-style-name="Index_20_Link">Diagrama de Gantt<text:tab/>10</text:a></text:p>
          <text:p text:style-name="P10"><text:a xlink:type="simple" xlink:href="#__RefHeading___Toc1187_3683543185" office:name="Implantación" text:style-name="Index_20_Link" text:visited-style-name="Index_20_Link">Implantación<text:tab/>11</text:a></text:p>
          <text:p text:style-name="P11"><text:a xlink:type="simple" xlink:href="#__RefHeading___Toc1189_3683543185" office:name="Implementación" text:style-name="Index_20_Link" text:visited-style-name="Index_20_Link">Implementación<text:tab/>11</text:a></text:p>
          <text:p text:style-name="P11"><text:a xlink:type="simple" xlink:href="#__RefHeading___Toc1191_3683543185" office:name="Seguimiento" text:style-name="Index_20_Link" text:visited-style-name="Index_20_Link">Seguimiento<text:tab/>11</text:a></text:p>
          <text:p text:style-name="P10"><text:a xlink:type="simple" xlink:href="#__RefHeading___Toc1193_3683543185" office:name="Conclusiones" text:style-name="Index_20_Link" text:visited-style-name="Index_20_Link">Conclusiones<text:tab/>11</text:a></text:p>
          <text:p text:style-name="P10"><text:a xlink:type="simple" xlink:href="#__RefHeading___Toc1195_3683543185" office:name="Limitaciones y prospectiva" text:style-name="Index_20_Link" text:visited-style-name="Index_20_Link">Limitaciones y prospectiva<text:tab/>12</text:a></text:p>
          <text:p text:style-name="P10"><text:a xlink:type="simple" xlink:href="#__RefHeading___Toc1197_3683543185" office:name="Referencias bibliográficas" text:style-name="Index_20_Link" text:visited-style-name="Index_20_Link">Referencias bibliográficas<text:tab/>13</text:a></text:p>
        </text:index-body>
      </text:table-of-content>
      <text:p text:style-name="Normal"/>
      <text:p text:style-name="Normal"/>
      <text:p text:style-name="Normal"/>
      <text:p text:style-name="Normal"/>
      <text:p text:style-name="Normal"/>
      <text:h text:style-name="P13" text:outline-level="1"><text:bookmark-start text:name="_Toc209068947"/><text:bookmark-start text:name="__RefHeading___Toc1145_3683543185"/><text:span text:style-name="Fuente_20_de_20_párrafo_20_predeter."><text:span text:style-name="T3">Introducción</text:span></text:span><text:bookmark-end text:name="_Toc209068947"/><text:span text:style-name="Fuente_20_de_20_párrafo_20_predeter."><text:span text:style-name="T3"> </text:span></text:span><text:bookmark-end text:name="__RefHeading___Toc1145_3683543185"/></text:h>
      <text:h text:style-name="Título_20_2" text:outline-level="2"><text:bookmark-start text:name="__RefHeading___Toc1147_3683543185"/><text:span text:style-name="Fuente_20_de_20_párrafo_20_predeter."><text:span text:style-name="T4">Planteamiento del problema y </text:span></text:span><text:bookmark-start text:name="_Toc209068948"/><text:span text:style-name="Fuente_20_de_20_párrafo_20_predeter."><text:span text:style-name="T3">Justificación</text:span></text:span><text:bookmark-end text:name="__RefHeading___Toc1147_3683543185"/><text:bookmark-end text:name="_Toc209068948"/></text:h>
      <text:p text:style-name="P14"><text:span text:style-name="Fuente_20_de_20_párrafo_20_predeter."><text:span text:style-name="T5">En los últimos años el comercio digital ha tenido un gran crecimiento, especialmente en los sectores relacionados con el ocio digital y los videojuegos. A pesar de que hay una gran cantidad de tiendas online exist5entes, muchas de ellas tienen interfaces poco intuitivas, falta de claridad en alguna información de los productos o una experiencia para el usuario bastante mejorable.</text:span></text:span></text:p>
      <text:p text:style-name="P14"><text:span text:style-name="Fuente_20_de_20_párrafo_20_predeter."><text:span text:style-name="T5">La realización de este proyecto viene de la necesidad de diseñar y desarrollar una tienda web de artículos de videojuegos que ofrezca una navegación más sencilla e intuitiva, junto a una presentación visual atractiva. El objetivo es crear una plataforma que permite al usuario acceder fácilmente al catálogo de productos, consultar información detallada y simular el proceso de compra de la manera más eficiente posible.</text:span></text:span></text:p>
      <text:p text:style-name="P14"><text:span text:style-name="Fuente_20_de_20_párrafo_20_predeter."><text:span text:style-name="T5">Además, este proyecto permite usar de forma práctica los conocimientos que se han adquirido en el grado de Desarrollo de Aplicaciones Web, utilizando tecnologías de frontend y backend en un entorno cercano al mercado actual.</text:span></text:span></text:p>
      <text:h text:style-name="Título_20_2" text:outline-level="2"><text:bookmark-start text:name="_Toc209068950"/><text:bookmark-start text:name="__RefHeading___Toc1149_3683543185"/><text:span text:style-name="Fuente_20_de_20_párrafo_20_predeter."><text:span text:style-name="T3">Objetivos</text:span></text:span><text:bookmark-end text:name="_Toc209068950"/><text:bookmark-end text:name="__RefHeading___Toc1149_3683543185"/></text:h>
      <text:h text:style-name="Título_20_3" text:outline-level="3"><text:bookmark-start text:name="_Toc209068951"/><text:bookmark-start text:name="__RefHeading___Toc1151_3683543185"/>Objetivo general<text:bookmark-end text:name="_Toc209068951"/><text:bookmark-end text:name="__RefHeading___Toc1151_3683543185"/></text:h>
      <text:p text:style-name="P15">Como objetivo general del proyecto tenemos diseñar y desarrollar una tienda web funcional de artículos relacionados con los videojuegos, aplicando criterios de usabilidad, diseño responsive y gestión de datos.</text:p>
      <text:h text:style-name="Título_20_3" text:outline-level="3"><text:bookmark-start text:name="_Toc209068952"/><text:bookmark-start text:name="__RefHeading___Toc1153_3683543185"/>Objetivos específicos<text:bookmark-end text:name="_Toc209068952"/><text:bookmark-end text:name="__RefHeading___Toc1153_3683543185"/></text:h>
      <text:p text:style-name="P15">En cuanto a los objetivos especificos podemos encontrarnos con:</text:p>
      <text:p text:style-name="P15">- Diseñar una interfaz web clara e intuitiva que facilite la navegación del usuario.</text:p>
      <text:p text:style-name="P15">- Implementar un sistema de gestión de productos con una base de datos.</text:p>
      <text:p text:style-name="P14"><text:soft-page-break/><text:span text:style-name="T6">- </text:span><text:span text:style-name="T7">Desarrollar funcionalidades básicas de una tienda online, como el catálogo de productos y el carrito de la compra.</text:span></text:p>
      <text:p text:style-name="P14">- <text:span text:style-name="T7">Garantizar un correcto funcionamiento en distintos dispositivos y navegadores.</text:span></text:p>
      <text:h text:style-name="Título_20_1" text:outline-level="1"><text:bookmark-start text:name="_Toc209068953"/><text:bookmark-start text:name="__RefHeading___Toc1155_3683543185"/><text:span text:style-name="Fuente_20_de_20_párrafo_20_predeter."><text:span text:style-name="T3">Análisis</text:span></text:span><text:bookmark-end text:name="_Toc209068953"/><text:bookmark-end text:name="__RefHeading___Toc1155_3683543185"/></text:h>
      <text:h text:style-name="Título_20_2" text:outline-level="2"><text:bookmark-start text:name="_Toc209068954"/><text:bookmark-start text:name="__RefHeading___Toc1157_3683543185"/><text:span text:style-name="Fuente_20_de_20_párrafo_20_predeter."><text:span text:style-name="T3">Requisitos funcionales / no funcionales</text:span></text:span><text:bookmark-end text:name="_Toc209068954"/><text:bookmark-end text:name="__RefHeading___Toc1157_3683543185"/></text:h>
      <text:h text:style-name="P16" text:outline-level="3"><text:bookmark-start text:name="_Toc209068955"/><text:bookmark-start text:name="__RefHeading___Toc1159_3683543185"/>R<text:bookmark-end text:name="_Toc209068955"/>equisitos funcionales<text:bookmark-end text:name="__RefHeading___Toc1159_3683543185"/></text:h>
      <text:p text:style-name="P17">Para este proyecto vamos a establecer los siguientes requisitos funcionales:</text:p>
      <text:p text:style-name="P17">- Permitir la visualización de un catálogo de productos de videojuegos.</text:p>
      <text:p text:style-name="P17">- Mostrar información detallada de cada producto (nombre, descripción, precio e imagen).</text:p>
      <text:p text:style-name="P17">- Permitir el registro y autenticación de usuarios.</text:p>
      <text:p text:style-name="P17">- Implementar un carrito de compra para la selección de productos.</text:p>
      <text:p text:style-name="P17">- Gestionar los productos desde un perfil administrador.</text:p>
      <text:p text:style-name="P17">-Permitir la navegación por categorías de productos</text:p>
      <text:h text:style-name="P16" text:outline-level="3"><text:bookmark-start text:name="__RefHeading___Toc1161_3683543185"/>Requisitos no funcionales<text:bookmark-end text:name="__RefHeading___Toc1161_3683543185"/></text:h>
      <text:p text:style-name="P17">En cuanto a los requisitos no funcionales nos encontramos con:</text:p>
      <text:p text:style-name="P17">- La aplicación deberá ser accesible desde distintos navegadores web actuales.</text:p>
      <text:p text:style-name="P17">- La interfaz deberá ser responsive y adaptarse a diferentes tamaños de pantalla.</text:p>
      <text:p text:style-name="P17">- El sistema deberá ofrecer tiempos de carga adecuados.</text:p>
      <text:p text:style-name="P17">- La aplicación deberá garantizar una estructura clara y una navegación intuitiva.</text:p>
      <text:p text:style-name="P17">- La información almacenada deberá gestionarse de forma segura.</text:p>
      <text:p text:style-name="Normal"/>
      <text:h text:style-name="Título_20_2" text:outline-level="2"><text:bookmark-start text:name="__RefHeading___Toc1163_3683543185"/><text:soft-page-break/><text:span text:style-name="Fuente_20_de_20_párrafo_20_predeter."><text:span text:style-name="T3"><text:s/></text:span></text:span><text:bookmark-start text:name="_Toc209068957"/><text:span text:style-name="Fuente_20_de_20_párrafo_20_predeter."><text:span text:style-name="T3">Estudio del Arte</text:span></text:span><text:bookmark-end text:name="__RefHeading___Toc1163_3683543185"/><text:bookmark-end text:name="_Toc209068957"/></text:h>
      <text:h text:style-name="P18" text:outline-level="4" text:is-list-header="true">Actualmente existen numerosas tiendas online dedicadas a la venta de videojuegos y productos relacionados y estas ofrecen catálogos extensos, sistemas de búsqueda, carritos de compra y diseños adaptados a dispositivos móviles.</text:h>
      <text:p text:style-name="P19">El análisis de estas plataformas permite identificar buenas prácticas, como la organización por categorías, usar fichas de productos bien detalladas y la importancia de tener una interfaz clara y sencilla de usar para el usuario. Pero, muchas de estas páginas presentan estructuras no muy claras o una sobrecarga de información que puede dificultar la experiencia de los usuarios.</text:p>
      <text:p text:style-name="P19">Este proyecto toma como referencia estas páginas, adaptando sus principales funcionalidades a una aplicación web de menor escala, que se centra en la simplicidad, la usabilidad y el aprendizaje práctico del desarrollo web.</text:p>
      <text:h text:style-name="P20" text:outline-level="2"><text:bookmark-start text:name="__RefHeading___Toc1163_3683543185 Copia 1"/><text:span text:style-name="Fuente_20_de_20_párrafo_20_predeter."><text:s/></text:span><text:bookmark-start text:name="_Toc209068958"/><text:bookmark-start text:name="_Toc209068957 Copia 1"/><text:span text:style-name="Fuente_20_de_20_párrafo_20_predeter."><text:span text:style-name="T3">Arquitectura de la aplicación</text:span></text:span><text:bookmark-end text:name="__RefHeading___Toc1163_3683543185 Copia 1"/><text:bookmark-end text:name="_Toc209068958"/><text:bookmark-end text:name="_Toc209068957 Copia 1"/></text:h>
      <text:h text:style-name="P21" text:outline-level="4" text:is-list-header="true"><text:bookmark-start text:name="__RefHeading___Toc1167_3683543185"/>La arquitectura escogida en el desarrollo de la aplicación es el modelo MVC(Modelo-Vista-Controlador). Este modelo permite separar la lógica de negocio, la gestión de datos y la presentación de la información.<text:bookmark-end text:name="__RefHeading___Toc1167_3683543185"/></text:h>
      <text:p text:style-name="P22"><text:tab/><text:span text:style-name="T8">Modelo:</text:span> Gestionará el acceso a la base de datos y la lógica relacionada con los productos y usuarios.</text:p>
      <text:p text:style-name="P22"><text:tab/><text:span text:style-name="T8">Vista: </text:span><text:span text:style-name="T9">Se encargará de la presentación visual de la aplicación mediante HTML, CSS y Bootstrap.</text:span></text:p>
      <text:p text:style-name="P23"><text:tab/><text:span text:style-name="T8">Controlador:</text:span> Será como el intermediario entre el modelo y la vista, gestionando las acciones del usuario.</text:p>
      <text:p text:style-name="P23">Esta elección de arquitectura se puede justificar por su claridad, facilidad de mantenimiento y adaptación al uso de PHP en aplicaciones web.</text:p>
      <text:p text:style-name="P23"/>
      <text:h text:style-name="P20" text:outline-level="2"><text:bookmark-start text:name="_Toc209068960 Copia 1"/><text:bookmark-start text:name="__RefHeading___Toc1169_3683543185 Copia 1"/><text:soft-page-break/><text:span text:style-name="Fuente_20_de_20_párrafo_20_predeter."><text:s/></text:span><text:bookmark-end text:name="_Toc209068960 Copia 1"/><text:bookmark-start text:name="_Toc209068959"/><text:span text:style-name="Fuente_20_de_20_párrafo_20_predeter."><text:span text:style-name="T3">Software y tecnologías utilizadas</text:span></text:span><text:bookmark-end text:name="__RefHeading___Toc1169_3683543185 Copia 1"/><text:bookmark-end text:name="_Toc209068959"/></text:h>
      <text:h text:style-name="P24" text:outline-level="4" text:is-list-header="true">Para el desarrollo y despliegue de la aplicación web se emplearán las siguientes herramientas y tecnologías:</text:h>
      <text:p text:style-name="P25"><text:tab/><text:span text:style-name="T10">Lenguajes de programación:</text:span></text:p>
      <text:p text:style-name="P26"><text:tab/><text:tab/><text:span text:style-name="T9">- HTML y CSS para la estructura y diseño de la interfaz.</text:span></text:p>
      <text:p text:style-name="P27"><text:tab/><text:tab/>- JavaScript para el frontend.</text:p>
      <text:p text:style-name="P27"><text:tab/><text:tab/>- PHP para el backend.</text:p>
      <text:p text:style-name="P27"><text:tab/><text:span text:style-name="T8">Base de datos:</text:span></text:p>
      <text:p text:style-name="P27"><text:tab/><text:tab/>- MySQL para el almacenamiento y gestión de la información.</text:p>
      <text:p text:style-name="P27"><text:tab/><text:span text:style-name="T8">Entorno de desarrollo:</text:span></text:p>
      <text:p text:style-name="P27"><text:tab/><text:tab/>- Visual Studio Code como editor de código.</text:p>
      <text:p text:style-name="P27"><text:tab/><text:tab/>- Servidor local mediante XAMPP o similar.</text:p>
      <text:p text:style-name="P27"><text:tab/><text:span text:style-name="T11">Control de versiones:</text:span></text:p>
      <text:p text:style-name="P28"><text:tab/><text:tab/><text:span text:style-name="T9">- Git para el control de versiones del proyecto.</text:span></text:p>
      <text:p text:style-name="P29"><text:tab/><text:span text:style-name="T8">Despliegue de la aplicación web:</text:span></text:p>
      <text:p text:style-name="P28"><text:tab/><text:tab/><text:span text:style-name="T9">- Publicación en un servidor web compatible con PHP y MySQL.</text:span></text:p>
      <text:h text:style-name="Título_20_2" text:outline-level="2"><text:bookmark-start text:name="_Toc209068960"/><text:bookmark-start text:name="__RefHeading___Toc1169_3683543185"/><text:span text:style-name="Fuente_20_de_20_párrafo_20_predeter."><text:span text:style-name="T3">Justificación de viabilidad</text:span></text:span><text:bookmark-end text:name="_Toc209068960"/><text:bookmark-end text:name="__RefHeading___Toc1169_3683543185"/></text:h>
      <text:h text:style-name="P30" text:outline-level="4" text:is-list-header="true">Viabilidad Técnica:</text:h>
      <text:p text:style-name="P31">El proyecto es técnicamente viable, ya que utiliza tecnologías trabajadas durante el grado, como HTML, CSS,JavaScript, PHP y MySQL, lo que asegura su correcta implementación en el desarrollo de la aplicación.</text:p>
      <text:p text:style-name="P31"/>
      <text:p text:style-name="P32"><text:bookmark-start text:name="__RefHeading___Toc1167_3683543185 Copia 1"/><text:soft-page-break/>Viabilidad Económica:<text:bookmark-end text:name="__RefHeading___Toc1167_3683543185 Copia 1"/></text:p>
      <text:p text:style-name="P31">El desarrollo del proyecto no requiere una inversión económica elevada, ya que se utilizan herramientas de desarrollo gratuitas <text:span text:style-name="T12">y de código abierto. Los únicos costes serían los del alojamiento de la página web y el dominio, en caso de realizar el despliegue público.</text:span></text:p>
      <text:p text:style-name="P33">Viabilidad operativa:</text:p>
      <text:p text:style-name="P34">La aplicación es operativamente viable, ya que su implementación es posible en el tiempo disponible y su mantenimiento resulta sencillo gracias a una arquitectura clara y una estructura bien definida.</text:p>
      <text:h text:style-name="Título_20_1" text:outline-level="1"><text:bookmark-start text:name="_Toc209068961"/><text:bookmark-start text:name="__RefHeading___Toc1171_3683543185"/><text:span text:style-name="Fuente_20_de_20_párrafo_20_predeter."><text:span text:style-name="T3">Diseño</text:span></text:span><text:bookmark-end text:name="_Toc209068961"/><text:bookmark-end text:name="__RefHeading___Toc1171_3683543185"/></text:h>
      <text:h text:style-name="P35" text:outline-level="2"><text:bookmark-start text:name="__RefHeading___Toc1173_3683543185"/><text:bookmark-start text:name="_Toc209068962"/>Árbol de navegación<text:bookmark-end text:name="__RefHeading___Toc1173_3683543185"/><text:bookmark-end text:name="_Toc209068962"/></text:h>
      <text:p text:style-name="P36">Este esquema permite ver de manera clara la organización del sitio y garantizar una navegación sencilla e intuitiva.</text:p>
      <text:p text:style-name="P36">La aplicación contará con una página de inicio desde la que se podrá acceder al catálogo de productos, al carrito de compra y a las opciones de usuario. El catálogo estará organizado por categorías para facilitar la búsqueda de productos, permitiendo acceder a fichas individuales con información detallada de cada artículo.</text:p>
      <text:p text:style-name="P36">Los usuarios registrados tendrán un área personal desde la que podrán gestionar su perfil, consultar sus pedidos pendientes, acceder al carrito y cerrar sesión. La aplicación también contará con un panel de administración exclusivo para el usuario administrador, desde la cual se podrán gestionar los productos disponibles, los usuarios registrados y los pedidos realizados.</text:p>
      <text:p text:style-name="P36">La estructura de navegación se ha diseñado para facilitar el acceso a la información y mejorar la experiencia del usuario.</text:p>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h text:style-name="P35" text:outline-level="2"/>
      <text:h text:style-name="P35" text:outline-level="2"><text:bookmark-start text:name="_Toc209068963"/><text:bookmark-start text:name="__RefHeading___Toc1175_3683543185"/>Prototipo<text:bookmark-end text:name="_Toc209068963"/><text:bookmark-end text:name="__RefHeading___Toc1175_3683543185"/></text:h>
      <text:p text:style-name="P37">La distribución de los elementos en cada pantalla ha sido diseñada siguiendo criterios de usabilidad y simplicidad, priorizando una navegación clara. Las pantallas se podrán distribuir de la siguiente manera:</text:p>
      <text:p text:style-name="P38">- <text:span text:style-name="T13">Página de Inicio Sesión o Registro</text:span></text:p>
      <text:p text:style-name="P38"/>
      <text:p text:style-name="P38"/>
      <text:p text:style-name="P38"/>
      <text:p text:style-name="P38"/>
      <text:p text:style-name="P38"/>
      <text:p text:style-name="P38"/>
      <text:p text:style-name="P38"><text:soft-page-break/>- <text:span text:style-name="T13">Página Inicial</text:span></text:p>
      <text:p text:style-name="Normal"/>
      <text:p text:style-name="Normal"/>
      <text:p text:style-name="Normal"/>
      <text:p text:style-name="Normal"/>
      <text:p text:style-name="Normal"/>
      <text:p text:style-name="Normal"/>
      <text:p text:style-name="P39">- Página Catálogo</text:p>
      <text:p text:style-name="Normal"/>
      <text:p text:style-name="Normal"/>
      <text:p text:style-name="Normal"/>
      <text:p text:style-name="Normal"/>
      <text:p text:style-name="Normal"/>
      <text:p text:style-name="P40">- <text:span text:style-name="T13">Página Ficha Producto</text:span></text:p>
      <text:p text:style-name="Normal"/>
      <text:p text:style-name="Normal"/>
      <text:p text:style-name="Normal"/>
      <text:p text:style-name="Normal"/>
      <text:p text:style-name="Normal"/>
      <text:p text:style-name="Normal"/>
      <text:p text:style-name="Normal"/>
      <text:p text:style-name="P40"><text:soft-page-break/>- <text:span text:style-name="T13">Página Administrador</text:span></text:p>
      <text:p text:style-name="Normal"/>
      <text:p text:style-name="Normal"/>
      <text:p text:style-name="Normal"/>
      <text:p text:style-name="Normal"/>
      <text:p text:style-name="Normal"/>
      <text:p text:style-name="Normal"/>
      <text:h text:style-name="P41" text:outline-level="2"><text:bookmark-start text:name="__RefHeading___Toc1177_3683543185"/><text:bookmark-start text:name="_Toc209068964"/><text:span text:style-name="Fuente_20_de_20_párrafo_20_predeter."><text:span text:style-name="T3">Diagramas</text:span></text:span><text:bookmark-end text:name="__RefHeading___Toc1177_3683543185"/><text:bookmark-end text:name="_Toc209068964"/></text:h>
      <text:p text:style-name="P42"><text:span text:style-name="Fuente_20_de_20_párrafo_20_predeter."><text:span text:style-name="T3"/></text:span></text:p>
      <text:h text:style-name="Título_20_3" text:outline-level="3"><text:bookmark-start text:name="_Toc209068965"/><text:bookmark-start text:name="__RefHeading___Toc1179_3683543185"/>Diagrama de casos de uso<text:bookmark-end text:name="_Toc209068965"/><text:bookmark-end text:name="__RefHeading___Toc1179_3683543185"/></text:h>
      <text:p text:style-name="P43">Este diagrama permite identificar de forma clara que acciones puede realizar cada tipo de usuario dentro de la tienda web.</text:p>
      <text:p text:style-name="P43">En la aplicación nos podemos encontrar con los dos actores principales que son: el usuario, el cual puede ser un visitante o un usuario registrado, y el administrador, que es el encargado de la gestión interna del sistema. El usuario puede visualizar el catálogo de productos, consultar la ficha de cada producto, gestionar el carrito de compra, registrarse e iniciar sesión, editar su perfil y consultar sus pedidos pendientes. El administrador es el único con acceso al panel de administración, desde el cual puede gestionar los productos, usuarios y pedidos.</text:p>
      <text:p text:style-name="P43">El siguiente diagrama facilitará la comprensión del funcionamiento del sistema:</text:p>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h text:style-name="Título_20_3" text:outline-level="3"><text:bookmark-start text:name="_Toc209068966"/><text:bookmark-start text:name="__RefHeading___Toc1181_3683543185"/>Diagrama de clases<text:bookmark-end text:name="_Toc209068966"/><text:bookmark-end text:name="__RefHeading___Toc1181_3683543185"/></text:h>
      <text:p text:style-name="P44">Para el proyecto se han definido las clases principales para gestionar el catálogo de productos, el sistema de usuarios, el carrito de compra y los pedidos. En la siguiente imagen se puede ver el diagrama de clases de este proyecto:</text:p>
      <text:p text:style-name="P44"/>
      <text:p text:style-name="P44"/>
      <text:p text:style-name="P44"/>
      <text:p text:style-name="P44"/>
      <text:p text:style-name="P44"/>
      <text:p text:style-name="P44"/>
      <text:p text:style-name="P44"/>
      <text:p text:style-name="P44"><text:soft-page-break/></text:p>
      <text:h text:style-name="Título_20_3" text:outline-level="3"><text:bookmark-start text:name="_Toc209068967"/><text:bookmark-start text:name="__RefHeading___Toc1183_3683543185"/>Modelo Entidad Relación<text:bookmark-end text:name="_Toc209068967"/><text:bookmark-end text:name="__RefHeading___Toc1183_3683543185"/></text:h>
      <text:p text:style-name="P45">Este diagrama define como se almacenará la información en la base de datos antes de su implementación, asegurando una correcta organización. Se han identificado las entidades principales para gestionar el catálogo de productos, los usuarios, el carrito y los pedidos. Las relaciones entre entidades reflejan las interacciones reales del sistema.</text:p>
      <text:p text:style-name="P45"/>
      <text:p text:style-name="P45"/>
      <text:p text:style-name="P45"/>
      <text:p text:style-name="P45"/>
      <text:p text:style-name="P45"/>
      <text:p text:style-name="P45"/>
      <text:p text:style-name="P45"/>
      <text:p text:style-name="P45"/>
      <text:p text:style-name="P45"/>
      <text:h text:style-name="Título_20_3" text:outline-level="3"><text:bookmark-start text:name="_Toc209068968"/><text:bookmark-start text:name="__RefHeading___Toc1185_3683543185"/>Diagrama de Gantt<text:bookmark-end text:name="_Toc209068968"/><text:bookmark-end text:name="__RefHeading___Toc1185_3683543185"/></text:h>
      <text:p text:style-name="P46">Para este proyecto se han definido varias fases principales, desde el análisis y diseño hasta el desarrollo, las pruebas y la entrega final. El diagrama de Gantt facilita la organización del trabajo, ayuda a detectar posibles retrasos y permite ajustar la planificación de forma realista durante el desarrollo.</text:p>
      <text:p text:style-name="Normal"/>
      <text:p text:style-name="P47"/>
      <text:h text:style-name="Título_20_1" text:outline-level="1"><text:bookmark-start text:name="_Toc209068969"/><text:bookmark-start text:name="__RefHeading___Toc1187_3683543185"/><text:span text:style-name="Fuente_20_de_20_párrafo_20_predeter."><text:span text:style-name="T3">Implantación</text:span></text:span><text:bookmark-end text:name="_Toc209068969"/><text:bookmark-end text:name="__RefHeading___Toc1187_3683543185"/></text:h>
      <text:p text:style-name="Normal">Texto Normal del menú de estilos.</text:p>
      <text:p text:style-name="P48"/>
      <text:h text:style-name="Título_20_2" text:outline-level="2"><text:bookmark-start text:name="_Toc209068970"/><text:bookmark-start text:name="__RefHeading___Toc1189_3683543185"/><text:span text:style-name="Fuente_20_de_20_párrafo_20_predeter."><text:span text:style-name="T3">Implementación</text:span></text:span><text:bookmark-end text:name="_Toc209068970"/><text:bookmark-end text:name="__RefHeading___Toc1189_3683543185"/></text:h>
      <text:p text:style-name="Normal">Texto Normal del menú de estilos.</text:p>
      <text:p text:style-name="Normal"/>
      <text:h text:style-name="Título_20_2" text:outline-level="2"><text:bookmark-start text:name="_Toc209068971"/><text:bookmark-start text:name="__RefHeading___Toc1191_3683543185"/><text:span text:style-name="Fuente_20_de_20_párrafo_20_predeter."><text:span text:style-name="T3">Seguimiento</text:span></text:span><text:bookmark-end text:name="_Toc209068971"/><text:bookmark-end text:name="__RefHeading___Toc1191_3683543185"/></text:h>
      <text:p text:style-name="Normal">Texto Normal del menú de estilos.</text:p>
      <text:p text:style-name="Normal"/>
      <text:p text:style-name="Normal"/>
      <text:p text:style-name="Normal"/>
      <text:h text:style-name="Título_20_1" text:outline-level="1"><text:bookmark-start text:name="_Toc209068972"/><text:bookmark-start text:name="__RefHeading___Toc1193_3683543185"/><text:span text:style-name="Fuente_20_de_20_párrafo_20_predeter."><text:span text:style-name="T3">Conclusiones</text:span></text:span><text:bookmark-end text:name="_Toc209068972"/><text:bookmark-end text:name="__RefHeading___Toc1193_3683543185"/></text:h>
      <text:p text:style-name="Normal">Texto Normal del menú de estilos.</text:p>
      <text:p text:style-name="Normal"/>
      <text:p text:style-name="P47"/>
      <text:h text:style-name="Título_20_1" text:outline-level="1"><text:bookmark-start text:name="_Toc209068973"/><text:bookmark-start text:name="__RefHeading___Toc1195_3683543185"/><text:span text:style-name="Fuente_20_de_20_párrafo_20_predeter."><text:span text:style-name="T3">Limitaciones y prospectiva</text:span></text:span><text:bookmark-end text:name="_Toc209068973"/><text:bookmark-end text:name="__RefHeading___Toc1195_3683543185"/></text:h>
      <text:p text:style-name="Normal">Texto Normal del menú de estilos.</text:p>
      <text:p text:style-name="Normal"/>
      <text:p text:style-name="Normal"/>
      <text:p text:style-name="Normal"/>
      <text:p text:style-name="P47"/>
      <text:h text:style-name="P49" text:outline-level="1"><text:bookmark-start text:name="_Toc209068974"/><text:bookmark-start text:name="__RefHeading___Toc1197_3683543185"/>Referencias bibliográficas<text:bookmark-end text:name="_Toc209068974"/><text:bookmark-end text:name="__RefHeading___Toc1197_3683543185"/></text:h>
      <text:p text:style-name="P50"/>
      <text:p text:style-name="Referencias_20_bibliográficas">Swanson, E., Barnes, M., Fall, A. M., &amp; Roberts, G. (2017). Predictors of Reading Comprehension Among Struggling Readers Who Exhibit Differing Levels of Inattention and Hyperactivity. <text:span text:style-name="Fuente_20_de_20_párrafo_20_predeter."><text:span text:style-name="T14">Reading &amp; Writing Quarterly, 34</text:span></text:span>(2), 132-146. doi:<text:span text:style-name="Fuente_20_de_20_párrafo_20_predeter."><text:span text:style-name="T15">10.1080/10573569.2017.1359712</text:span></text:span></text:p>
      <text:p text:style-name="P47"/>
      <text:list text:style-name="LFO23">
        <text:list-item>
          <text:p text:style-name="Anexo"><text:bookmark-start text:name="_Toc209068975"/>Manual del desarrollador<text:bookmark-end text:name="_Toc209068975"/></text:p>
        </text:list-item>
      </text:list>
      <text:p text:style-name="Normal">Texto Normal del menú de estilos.</text:p>
      <text:p text:style-name="P47"/>
      <text:list text:continue-numbering="true" text:style-name="LFO23">
        <text:list-item>
          <text:p text:style-name="Anexo"><text:bookmark-start text:name="_Toc209068976"/>Manual de usuario<text:bookmark-end text:name="_Toc209068976"/></text:p>
        </text:list-item>
      </text:list>
      <text:p text:style-name="Normal">Texto Normal del menú de estilos.</text:p>
      <text:h text:style-name="P5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223f59"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left="0.635cm" fo:hyphenation-ladder-count="no-limit" fo:hyphenation-keep="auto" loext:hyphenation-keep-type="column" loext:hyphenation-keep-line="false" fo:keep-with-next="always">
        <style:tab-stops/>
      </style:paragraph-properties>
      <style:text-properties fo:text-transform="uppercase" fo:color="#a45d4e" loext:opacity="100%" style:font-name="Calibri Light" fo:font-family="'Calibri Light'" style:font-family-generic="swiss" style:font-pitch="variable" fo:font-size="18pt" style:letter-kerning="true" style:font-size-asian="18pt" style:font-size-complex="16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hyphenation-ladder-count="no-limit" fo:hyphenation-keep="auto" loext:hyphenation-keep-type="column" loext:hyphenation-keep-line="false" fo:keep-with-next="always"/>
      <style:text-properties fo:text-transform="uppercase" fo:color="#a45d4e" loext:opacity="100%" style:font-name="Calibri Light" fo:font-family="'Calibri Light'"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left="1.251cm" fo:hyphenation-ladder-count="no-limit" fo:hyphenation-keep="auto" loext:hyphenation-keep-type="column" loext:hyphenation-keep-line="false" fo:text-indent="-1.251cm" style:auto-text-indent="false" fo:keep-with-next="always">
        <style:tab-stops/>
      </style:paragraph-properties>
      <style:text-properties style:font-name="Calibri Light" fo:font-family="'Calibri Light'"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Párrafo_20_de_20_lista" style:next-style-name="Normal" style:default-outline-level="4">
      <style:paragraph-properties fo:margin-left="1.501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ítulo" style:family="paragraph" style:parent-style-name="Normal" style:next-style-name="Normal" style:default-outline-level="3" style:list-style-name="">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Cita" style:family="paragraph" style:parent-style-name="Normal" style:next-style-name="Norma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Índice_20_1" style:display-name="Índice 1" style:family="paragraph" style:parent-style-name="Normal" style:next-style-name="Normal" style:auto-update="true" style:list-style-name="LFO9">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Índice_20_2" style:display-name="Índice 2" style:family="paragraph" style:parent-style-name="Normal" style:next-style-name="Normal" style:auto-update="true">
      <style:paragraph-properties fo:margin-left="1.251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Índice_20_3" style:display-name="Índice 3" style:family="paragraph" style:parent-style-name="Normal" style:next-style-name="Normal" style:auto-update="true">
      <style:paragraph-properties fo:margin-left="0.39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a45d4e"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a45d4e"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Pie_20_de_20_página">
      <style:paragraph-properties fo:text-align="end" style:justify-single-word="false" fo:hyphenation-ladder-count="no-limit" fo:hyphenation-keep="auto" loext:hyphenation-keep-type="column" loext:hyphenation-keep-line="false"/>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Título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ie_20_de_20_foto-tabla" style:display-name="Pie de foto-tabla" style:family="paragraph" style:parent-style-name="Normal" style:next-style-name="Normal">
      <style:paragraph-properties fo:margin-left="-0.199cm" fo:margin-right="-0.379cm" fo:margin-top="0cm" fo:margin-bottom="0cm" style:contextual-spacing="false" fo:line-height="115%" fo:text-align="center" style:justify-single-word="false" fo:hyphenation-ladder-count="no-limit" fo:hyphenation-keep="auto" loext:hyphenation-keep-type="column" loext:hyphenation-keep-line="false">
        <style:tab-stops/>
      </style:paragraph-properties>
      <style:text-properties fo:color="#595959" loext:opacity="100%" style:font-name="Calibri" fo:font-family="Calibri" style:font-family-generic="swiss" style:font-pitch="variable" fo:font-size="9.5pt" fo:language="en" fo:country="US" style:font-size-asian="9.5pt" style:font-name-complex="UnitOT-Light" style:font-family-complex="UnitOT-Light" style:font-family-generic-complex="swiss" style:font-pitch-complex="variable" style:font-size-complex="9pt"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a45d4e"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a45d4e"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a45d4e"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5b9bd5"/>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1.134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512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style:font-name="Calibri Light" fo:font-size="10pt" officeooo:rsid="0007b5ff" officeooo:paragraph-rsid="0007b5ff" style:font-size-asian="10pt"/>
    </style:style>
    <style:style style:name="MP2" style:family="paragraph" style:parent-style-name="Encabezado">
      <style:paragraph-properties fo:margin-top="0cm" fo:margin-bottom="0cm" style:contextual-spacing="false" fo:line-height="100%" fo:text-align="end" style:justify-single-word="false"/>
      <style:text-properties style:font-name="Calibri Light" fo:font-size="10pt" style:font-size-asian="10pt"/>
    </style:style>
    <style:style style:name="MP3" style:family="paragraph" style:parent-style-name="Página">
      <style:text-properties officeooo:paragraph-rsid="0015f9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Roberto Rumenov Carrasco</text:p>
        <text:p text:style-name="MP2">Desarrollo de una tienda online de videojuegos </text:p>
      </style:header>
      <style:footer>
        <text:p text:style-name="MP3"><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
    <dc:subject/>
    <meta:creation-date>2025-09-18T09:09:00Z</meta:creation-date>
    <dc:date>2026-02-11T20:28:10.749022100</dc:date>
    <meta:print-date>2019-08-05T13:11:00Z</meta:print-date>
    <meta:editing-cycles>10</meta:editing-cycles>
    <meta:editing-duration>PT2H16M13S</meta:editing-duration>
    <meta:document-statistic meta:table-count="1" meta:image-count="11" meta:object-count="0" meta:page-count="18" meta:paragraph-count="146" meta:word-count="1584" meta:character-count="10346" meta:non-whitespace-character-count="8899"/>
    <meta:user-defined meta:name="ContentTypeId">0x010100DF3D7C797EA12745A270EF30E38719B9</meta:user-defined>
    <meta:user-defined meta:name="MediaServiceImageTags"/>
    <meta:template xlink:type="simple" xlink:actuate="onRequest" xlink:title="" xlink:href="Normal.dotm"/>
  </office:meta>
</office:document-meta>
</file>